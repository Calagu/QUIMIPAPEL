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ocumento de requisitos</text:p>
      <text:p text:style-name="P2">Proyecto: Aplicación de gestión de pedidos y reparto</text:p>
      <text:p text:style-name="P3">1. Introducción</text:p>
      <text:p text:style-name="Normal">La empresa QuimiPapel necesita una aplicación para mejorar la gestión de sus pedidos, productos, clientes y reparto.<text:s/>Se propone crear una aplicación que centralice los datos y facilite el trabajo diario.</text:p>
      <text:p text:style-name="Normal">El objetivo principal es desarrollar una solución sencilla que permita registrar clientes, productos y pedidos, además de consultar el estado de cada pedido y organizar las entregas.</text:p>
      <text:p text:style-name="P4">2. Objetivo del proyecto</text:p>
      <text:p text:style-name="Normal">El objetivo del proyecto es crear una aplicación de escritorio que ayude a la empresa a gestionar sus pedidos de forma más ordenada.</text:p>
      <text:p text:style-name="Normal">La aplicación permitirá:</text:p>
      <text:list text:style-name="LFO1" text:continue-numbering="true">
        <text:list-item>
          <text:p text:style-name="P5">Registrar clientes.<text:s/></text:p>
        </text:list-item>
        <text:list-item>
          <text:p text:style-name="P6">Registrar productos.<text:s/></text:p>
        </text:list-item>
        <text:list-item>
          <text:p text:style-name="P7">Crear pedidos.<text:s/></text:p>
        </text:list-item>
        <text:list-item>
          <text:p text:style-name="P8">Consultar pedidos existentes.<text:s/></text:p>
        </text:list-item>
        <text:list-item>
          <text:p text:style-name="P9">Cambiar el estado de los pedidos.<text:s/></text:p>
        </text:list-item>
        <text:list-item>
          <text:p text:style-name="P10">Ver los pedidos pendientes de reparto.<text:s/></text:p>
        </text:list-item>
        <text:list-item>
          <text:p text:style-name="P11">Acceder con diferentes roles de usuario.</text:p>
        </text:list-item>
      </text:list>
      <text:p text:style-name="Normal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3. Usuarios de la aplicación</text:p>
      <text:p text:style-name="Normal">La aplicación estará pensada para varios tipos de usuario:</text:p>
      <text:p text:style-name="P22">Administrador</text:p>
      <text:p text:style-name="Normal">Tendrá acceso completo a la aplicación. Podrá gestionar usuarios, clientes, productos y pedidos.</text:p>
      <text:p text:style-name="P23">Comercial</text:p>
      <text:p text:style-name="Normal">Podrá consultar clientes, crear pedidos y revisar el estado de los pedidos.</text:p>
      <text:p text:style-name="P24">Oficina</text:p>
      <text:p text:style-name="Normal">Podrá gestionar pedidos, cambiar estados y revisar información general.</text:p>
      <text:p text:style-name="P25">Repartidor</text:p>
      <text:p text:style-name="Normal">Podrá ver los pedidos asignados para reparto y marcarlos como entregados.</text:p>
      <text:p text:style-name="P26">4. Requisitos funcionales</text:p>
      <text:p text:style-name="P27">Inicio de sesión</text:p>
      <text:p text:style-name="Normal">La aplicación debe permitir iniciar sesión mediante usuario y contraseña.</text:p>
      <text:p text:style-name="P28">Roles de usuario</text:p>
      <text:p text:style-name="Normal">La aplicación debe mostrar diferentes opciones dependiendo del rol del usuario.</text:p>
      <text:p text:style-name="P29">Gestión de clientes</text:p>
      <text:p text:style-name="Normal">La aplicación debe permitir añadir, modificar, consultar y eliminar clientes.</text:p>
      <text:p text:style-name="P30">Gestión de productos</text:p>
      <text:p text:style-name="Normal">La aplicación debe permitir añadir, modificar, consultar y eliminar productos.</text:p>
      <text:p text:style-name="P31">Gestión de pedidos</text:p>
      <text:p text:style-name="Normal">La aplicación debe permitir crear pedidos asociando un cliente, uno o varios productos y una cantidad.</text:p>
      <text:p text:style-name="P32">Consulta de pedidos</text:p>
      <text:p text:style-name="Normal">La aplicación debe mostrar un listado de pedidos con información como cliente, fecha, estado y prioridad.</text:p>
      <text:p text:style-name="P33">Cambio de estado</text:p>
      <text:p text:style-name="Normal">La aplicación debe permitir cambiar el estado de un pedido.</text:p>
      <text:p text:style-name="Normal"/>
      <text:soft-page-break/>
      <text:p text:style-name="P34">Vista de reparto</text:p>
      <text:p text:style-name="Normal">La aplicación debe tener una pantalla donde el repartidor pueda ver los pedidos pendientes de entregar.</text:p>
      <text:p text:style-name="P35">Filtros de búsqueda</text:p>
      <text:p text:style-name="Normal">La aplicación debe permitir buscar pedidos por fecha, estado, cliente o urgencia.</text:p>
      <text:p text:style-name="P36">Indicadores de prioridad</text:p>
      <text:p text:style-name="Normal">La aplicación debe permitir marcar pedidos como normales, urgentes o muy urgentes.</text:p>
      <text:p text:style-name="P37">5. Requisitos no funcionales</text:p>
      <text:p text:style-name="P38">Facilidad de uso</text:p>
      <text:p text:style-name="Normal">La aplicación debe tener una interfaz sencilla y clara.</text:p>
      <text:p text:style-name="P39">Seguridad básica</text:p>
      <text:p text:style-name="Normal">Cada usuario debe acceder con su propia cuenta y solo ver las opciones permitidas según su rol.</text:p>
      <text:p text:style-name="P40">Organización de datos</text:p>
      <text:p text:style-name="Normal">La información debe guardarse en una base de datos MySQL.</text:p>
      <text:p text:style-name="P41">Rendimiento</text:p>
      <text:p text:style-name="Normal">La aplicación debe cargar los listados de clientes, productos y pedidos en un tiempo razonable.</text:p>
      <text:p text:style-name="P42">Mantenimiento</text:p>
      <text:p text:style-name="Normal">El código debe estar organizado por clases y separado en paquetes para facilitar futuras mejoras.</text:p>
      <text:p text:style-name="P43">7. Boceto inicial de pantallas</text:p>
      <text:p text:style-name="Normal">La aplicación tendrá las siguientes pantallas principales:</text:p>
      <text:p text:style-name="Normal">Pantalla de Login<text:line-break/>Menú principal<text:line-break/>Gestión de clientes<text:line-break/>Gestión de productos<text:line-break/>Gestión de pedidos<text:line-break/>Vista de reparto<text:line-break/>Panel de indicadores</text:p>
      <text:p text:style-name="Normal"/>
      <text:p text:style-name="Normal"><text:line-break/></text:p>
      <text:p text:style-name="P44"/>
      <text:soft-page-break/>
      <text:p text:style-name="P45">6. Datos que se van a guardar</text:p>
      <text:p text:style-name="Normal">La aplicación necesitará guardar información sobre:</text:p>
      <text:p text:style-name="P46">Usuarios</text:p>
      <text:p text:style-name="Normal">id<text:line-break/>nombre<text:line-break/>usuario<text:line-break/>contraseña<text:line-break/>rol</text:p>
      <text:p text:style-name="P47">Clientes</text:p>
      <text:p text:style-name="Normal">id<text:line-break/>nombre<text:line-break/>teléfono<text:line-break/>email<text:line-break/>dirección<text:line-break/>observaciones</text:p>
      <text:p text:style-name="P48">Productos</text:p>
      <text:p text:style-name="Normal">id<text:line-break/>nombre<text:line-break/>descripción<text:line-break/>precio<text:line-break/>stock<text:line-break/>categoría</text:p>
      <text:p text:style-name="P49">Pedidos</text:p>
      <text:p text:style-name="Normal">id<text:line-break/>cliente<text:line-break/>fecha<text:line-break/>estado<text:line-break/>prioridad<text:line-break/>observaciones</text:p>
      <text:p text:style-name="P50">Detalles de pedido</text:p>
      <text:p text:style-name="Normal">id<text:line-break/>pedido<text:line-break/>producto<text:line-break/>cantidad<text:line-break/>precio<text:line-break/>subtota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SOSPEDRA MICO</meta:initial-creator>
    <dc:creator>CARLOS SOSPEDRA MICO</dc:creator>
    <meta:creation-date>2026-05-13T09:33:00Z</meta:creation-date>
    <dc:date>2026-05-13T09:45:00Z</dc:date>
    <meta:template xlink:href="Normal.dotm" xlink:type="simple"/>
    <meta:editing-cycles>1</meta:editing-cycles>
    <meta:editing-duration>PT720S</meta:editing-duration>
    <meta:document-statistic meta:page-count="6" meta:paragraph-count="6" meta:word-count="537" meta:character-count="3490" meta:row-count="24" meta:non-whitespace-character-count="2959"/>
  </office:meta>
</office:document-meta>
</file>